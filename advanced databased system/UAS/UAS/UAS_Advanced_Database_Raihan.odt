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Arial" style:font-family-asian="Arial" style:font-family-complex="Arial" fo:background-color="transparent" fo:color="#365f91"/>
    </style:style>
    <style:style style:name="T2" style:family="text">
      <style:text-properties fo:font-size="12.00pt" fo:font-weight="bold" fo:font-family="Arial" style:font-family-asian="Arial" style:font-family-complex="Arial" fo:background-color="transparent" fo:color="#365f91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fo:color="#4f81bd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fo:color="#9b00d3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transparent" fo:color="#4f81bd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9b00d3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9b00d3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fo:color="#4f81bd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bold" fo:font-family="Arial" style:font-family-asian="Arial" style:font-family-complex="Arial" fo:background-color="transparent" fo:color="#4f81bd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center" fo:margin-top="24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top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top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top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top="10.00pt"/>
    </style:style>
    <style:style style:name="P1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AS Advanced Database</text:span><text:span text:style-name="T2"/></text:p>
      <text:p text:style-name="P2"><text:span text:style-name="T3"><text:line-break/></text:span><text:span text:style-name="T4">Nama: Raihan Muhammad Riswandi<text:line-break/>NIM: 24110500001<text:line-break/>Kelas: Advanced Datbase System<text:line-break/>Judul Proyek: Doctor Recommendation &amp; Feedback Analytics<text:line-break/>Modifikasi Individual: Fitur Laporan Statistik Dokter (Performance Report)<text:line-break/></text:span><text:span text:style-name="T5"/></text:p>
      <text:p text:style-name="P3"><text:span text:style-name="T6">1. Before (Sebelum Modifikasi)</text:span></text:p>
      <text:p text:style-name="P4"><text:span text:style-name="T7"><text:line-break/>Sebelum modifikasi, sistem hanya memiliki view `doctor_stats` yang menampilkan data jumlah review dan rata-rata rating per dokter. <text:line-break/>Belum ada analisis jumlah pasien, pendapatan dokter, atau kategori performa.</text:span></text:p>
      <text:p text:style-name="P5"><draw:frame text:anchor-type="as-char" svg:width="146.58mm" svg:height="90.22mm" style:rel-width="scale" style:rel-height="scale"><draw:object-ole xlink:href="OleObj1"/><draw:image xlink:href="ObjectReplacements/OleObj1"/></draw:frame><text:span text:style-name="T7"/></text:p>
      <text:p text:style-name="P6"><text:span text:style-name="T7"/></text:p>
      <text:p text:style-name="P6"><text:span text:style-name="T7"><text:line-break/>Kode Sebelum Modifikasi:</text:span><text:span text:style-name="T8"><text:line-break/>SELECT </text:span></text:p>
      <text:p text:style-name="P6"><text:span text:style-name="T8"><text:s text:c="4"/>d.doctor_id,</text:span></text:p>
      <text:p text:style-name="P6"><text:span text:style-name="T8"><text:s text:c="4"/>d.doctor_name,</text:span></text:p>
      <text:p text:style-name="P6"><text:span text:style-name="T8"><text:s text:c="4"/>d.specialization,</text:span></text:p>
      <text:p text:style-name="P6"><text:span text:style-name="T8"><text:s text:c="4"/>f.rating,</text:span></text:p>
      <text:p text:style-name="P6"><text:span text:style-name="T8"><text:s text:c="4"/>f.feedback_text</text:span></text:p>
      <text:p text:style-name="P6"><text:span text:style-name="T8">FROM doctors d</text:span></text:p>
      <text:p text:style-name="P6"><text:span text:style-name="T8">LEFT JOIN feedbacks f ON d.doctor_id = f.doctor_id</text:span></text:p>
      <text:p text:style-name="P6"><text:span text:style-name="T8">ORDER BY d.doctor_name;</text:span></text:p>
      <text:p text:style-name="P6"><text:span text:style-name="T9"/></text:p>
      <text:p text:style-name="P6"><text:span text:style-name="T10">Penjelasan:</text:span><text:span text:style-name="T11"/></text:p>
      <text:p text:style-name="P6"><text:span text:style-name="T11">Kode ini hanya menampilkan data mentah antara dokter dan feedback tanpa perhitungan statistik.</text:span></text:p>
      <text:p text:style-name="P7"><text:span text:style-name="T12">2. After (Setelah Modifikasi)</text:span></text:p>
      <text:p text:style-name="P8"><text:span text:style-name="T13"><text:line-break/>Setelah modifikasi, ditambahkan view baru bernama `doctor_performance_report` <text:line-break/>yang menampilkan jumlah pasien unik, total pendapatan, rata-rata rating, <text:line-break/>dan kategori performa dokter.<text:line-break/></text:span><draw:frame text:anchor-type="as-char" svg:width="146.58mm" svg:height="88.64mm" style:rel-width="scale" style:rel-height="scale"><draw:object-ole xlink:href="OleObj2"/><draw:image xlink:href="ObjectReplacements/OleObj2"/></draw:frame><text:span text:style-name="T13"/></text:p>
      <text:p text:style-name="P9"><text:span text:style-name="T13"/></text:p>
      <text:p text:style-name="P9"><text:span text:style-name="T13"/></text:p>
      <text:p text:style-name="P9"><text:span text:style-name="T13"><text:line-break/>Kode Setelah Modifikasi:<text:line-break/></text:span><text:span text:style-name="T14">CREATE OR REPLACE VIEW DoctorPerformanceReport AS</text:span></text:p>
      <text:p text:style-name="P9"><text:span text:style-name="T14">SELECT </text:span></text:p>
      <text:p text:style-name="P9"><text:span text:style-name="T14"><text:s text:c="4"/>d.doctor_id,</text:span></text:p>
      <text:p text:style-name="P9"><text:span text:style-name="T14"><text:s text:c="4"/>d.doctor_name,</text:span></text:p>
      <text:p text:style-name="P9"><text:span text:style-name="T14"><text:s text:c="4"/>d.specialization,</text:span></text:p>
      <text:p text:style-name="P9"><text:span text:style-name="T14"><text:s text:c="4"/>COUNT(f.feedback_id) AS total_feedbacks,</text:span></text:p>
      <text:p text:style-name="P9"><text:span text:style-name="T14"><text:s text:c="4"/>AVG(f.rating) AS average_rating,</text:span></text:p>
      <text:p text:style-name="P9"><text:span text:style-name="T14"><text:s text:c="4"/>COUNT(DISTINCT f.patient_id) AS total_patients</text:span></text:p>
      <text:p text:style-name="P9"><text:span text:style-name="T14">FROM doctors d</text:span></text:p>
      <text:p text:style-name="P9"><text:span text:style-name="T14">LEFT JOIN feedbacks f ON d.doctor_id = f.doctor_id</text:span></text:p>
      <text:p text:style-name="P9"><text:span text:style-name="T14">GROUP BY d.doctor_id, d.doctor_name, d.specialization</text:span></text:p>
      <text:p text:style-name="P9"><text:span text:style-name="T14">ORDER BY average_rating DESC;</text:span></text:p>
      <text:p text:style-name="P9"><text:span text:style-name="T14">SELECT * FROM DoctorPerformanceReport;</text:span></text:p>
      <text:p text:style-name="P9"><text:span text:style-name="T15">Penjelasan:</text:span><text:span text:style-name="T16"/></text:p>
      <text:p text:style-name="P9"><text:span text:style-name="T17">Modifikasi ini menambahkan analisis statistik dokter dengan query agregasi (COUNT, AVG) untuk membantu manajemen mengevaluasi performa dokter.</text:span></text:p>
      <text:p text:style-name="P10"><text:span text:style-name="T18">3. Penjelasan Modifikasi</text:span></text:p>
      <text:p text:style-name="P11"><text:span text:style-name="T19"><text:line-break/>Modifikasi ini meningkatkan fungsi sistem dari sekadar aplikasi feedback menjadi sistem analitik performa dokter berbasis data.</text:span></text:p>
      <text:p text:style-name="P11"><text:span text:style-name="T19">Dengan laporan statistik ini, pihak rumah sakit dapat menilai kinerja dokter, meningkatkan kualitas pelayanan, dan membuat keputusan berbasis data dengan lebih mudah.</text:span></text:p>
      <text:p text:style-name="P12"><text:span text:style-name="T20">4. Kesimpulan</text:span></text:p>
      <text:p text:style-name="P13"><text:span text:style-name="T21"><text:line-break/>Dengan adanya modifikasi ini, sistem Doctor Recommendation &amp; Feedback Analytics kini memiliki fitur laporan statistik dokter yang lebih lengkap dan informatif. <text:line-break/>Data seperti jumlah pasien, total pendapatan, dan rata-rata rating kini dapat digunakan untuk analisis kinerja dokter secara komprehensif.<text:line-break/>Modifikasi ini memperkaya fungsi analitis database dan meningkatkan nilai praktis sistem dalam mendukung pengambilan keputusan berbasis data.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